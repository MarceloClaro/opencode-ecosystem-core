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2" text:outline-level="2"><text:bookmark-start text:name="introdução"/>Introdução<text:bookmark-end text:name="introdução"/></text:h>
      <text:p text:style-name="First_20_paragraph">Este manuscrito demonstra o pipeline de produção científica do OpenCode Ecosystem Core, com a fórmula <draw:frame draw:style-name="fr1" text:anchor-type="as-char"><draw:object xlink:href="Formula-0/" xlink:type="simple" xlink:show="embed" xlink:actuate="onLoad"/></draw:frame> formatada em ambiente matemático, e a estrutura canônica de pasta única contendo todos os compilados.</text:p>
      <text:h text:style-name="Heading_20_2" text:outline-level="2"><text:bookmark-start text:name="metodologia"/>Metodologia<text:bookmark-end text:name="metodologia"/></text:h>
      <text:p text:style-name="First_20_paragraph">O pipeline converte a fonte Markdown canônica em LaTeX (template Qualis A1), e compila os formatos PDF, DOCX e ODT (compatível com Amazon KDP), gerando um manifesto auditável com checksums SHA-256 de cada artefato.</text:p>
      <text:h text:style-name="Heading_20_2" text:outline-level="2"><text:bookmark-start text:name="conclusão"/>Conclusão<text:bookmark-end text:name="conclusão"/></text:h>
      <text:p text:style-name="First_20_paragraph">A pasta única garante rastreabilidade completa da produção, do fonte ao compilado, atendendo ao rigor de reprodutibilidade Qualis A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7-05T09:21:20Z</meta:creation-date>
    <dc:date>2026-07-05T09:21:20Z</dc:date>
  </office:meta>
</office:document-meta>
</file>

<file path=Formula-0/content.xml><?xml version="1.0" encoding="utf-8"?>
<math xmlns="http://www.w3.org/1998/Math/MathML" display="inline">
  <mrow>
    <mi>E</mi>
    <mo>=</mo>
    <mi>m</mi>
    <msup>
      <mi>c</mi>
      <mn>2</mn>
    </msup>
  </mrow>
</math>
</file>
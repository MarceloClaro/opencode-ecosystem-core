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introducao"/>Introducao<text:bookmark-end text:name="introducao"/></text:h>
      <text:p text:style-name="First_20_paragraph">O ruido quantico pode ser benefico. # Metodologia Simulacao com statevector. # Resultados Acuracia media de 89%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6-07-05T10:43:09Z</meta:creation-date>
    <dc:date>2026-07-05T10:43:09Z</dc:date>
  </office:meta>
</office:document-meta>
</file>